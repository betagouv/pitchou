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8cm" fo:margin-left="0cm" table:align="left"/>
    </style:style>
    <style:style style:name="Table1.A" style:family="table-column">
      <style:table-column-properties style:column-width="5.71cm"/>
    </style:style>
    <style:style style:name="Table1.B" style:family="table-column">
      <style:table-column-properties style:column-width="7.489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6cm"/>
    </style:style>
    <style:style style:name="Table1.A1" style:family="table-cell">
      <style:table-cell-properties style:vertical-align="middle" fo:padding="0cm" fo:border="none"/>
    </style:style>
    <style:style style:name="Table1.3" style:family="table-row">
      <style:table-row-properties fo:background-color="#eeeeee">
        <style:background-image/>
      </style:table-row-properties>
    </style:style>
    <style:style style:name="P1" style:family="paragraph" style:parent-style-name="Standard">
      <style:paragraph-properties fo:text-align="center" style:justify-single-word="false"/>
      <style:text-properties style:font-name="Marianne" fo:font-size="10pt" fo:font-weight="bold" officeooo:rsid="003a25f8" officeooo:paragraph-rsid="003a25f8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Marianne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3bf995"/>
    </style:style>
    <style:style style:name="P5" style:family="paragraph" style:parent-style-name="Standard">
      <style:paragraph-properties fo:text-align="justify" style:justify-single-word="false"/>
      <style:text-properties style:font-name="Marianne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officeooo:paragraph-rsid="0012174b"/>
    </style:style>
    <style:style style:name="P7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fo:font-weight="bold" officeooo:rsid="000ff22d" officeooo:paragraph-rsid="004649f4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fo:font-weight="bold" officeooo:rsid="000ff22d" officeooo:paragraph-rsid="000ff22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Marianne" fo:font-size="10pt" style:text-underline-style="none" officeooo:rsid="00237977" officeooo:paragraph-rsid="00237977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Marianne" fo:font-size="10pt" officeooo:rsid="000ff22d" officeooo:paragraph-rsid="000ff22d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officeooo:rsid="000ff22d" officeooo:paragraph-rsid="000ff22d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officeooo:rsid="0039e6f1" officeooo:paragraph-rsid="0039e6f1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Marianne" fo:font-size="10pt" style:text-underline-style="none" officeooo:rsid="000ff22d" officeooo:paragraph-rsid="0039e6f1" style:font-size-asian="10pt" style:font-size-complex="10pt"/>
    </style:style>
    <style:style style:name="P14" style:family="paragraph" style:parent-style-name="Standard">
      <style:text-properties officeooo:paragraph-rsid="00439406"/>
    </style:style>
    <style:style style:name="P15" style:family="paragraph" style:parent-style-name="Standard">
      <style:text-properties style:font-name="Marianne" fo:font-size="10pt" style:text-underline-style="solid" style:text-underline-width="auto" style:text-underline-color="font-color" officeooo:rsid="0047b7be" officeooo:paragraph-rsid="00439406" fo:background-color="transparen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fo:font-weight="bold" officeooo:rsid="000ff22d" officeooo:paragraph-rsid="004348dd" fo:background-color="transparent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fo:font-weight="bold" officeooo:rsid="000ff22d" officeooo:paragraph-rsid="004348dd" fo:background-color="#ffff00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Marianne" fo:font-size="10pt" officeooo:rsid="003d1c97" officeooo:paragraph-rsid="004348dd" fo:background-color="transparent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Marianne" fo:font-size="10pt" officeooo:rsid="003d1c97" officeooo:paragraph-rsid="004348dd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fo:font-weight="bold" officeooo:rsid="0040f447" officeooo:paragraph-rsid="004348dd" fo:background-color="transparent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Marianne" fo:font-size="10pt" officeooo:rsid="0040f447" officeooo:paragraph-rsid="004348dd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Marianne" fo:font-size="10pt" style:text-underline-style="none" officeooo:rsid="000ff22d" officeooo:paragraph-rsid="004348dd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fo:font-weight="bold" officeooo:rsid="000ff22d" officeooo:paragraph-rsid="00453e7a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Marianne" fo:font-size="10pt" officeooo:rsid="000ff22d" officeooo:paragraph-rsid="00453e7a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Marianne" fo:font-size="10pt" officeooo:rsid="00126e42" officeooo:paragraph-rsid="00453e7a" style:font-size-asian="10pt" style:font-size-complex="10pt"/>
    </style:style>
    <style:style style:name="P26" style:family="paragraph" style:parent-style-name="Standard">
      <style:text-properties style:font-name="Marianne" fo:font-size="10pt" officeooo:paragraph-rsid="004649f4" style:font-size-asian="10pt" style:font-size-complex="10pt"/>
    </style:style>
    <style:style style:name="P27" style:family="paragraph" style:parent-style-name="Standard">
      <style:text-properties officeooo:paragraph-rsid="004649f4"/>
    </style:style>
    <style:style style:name="P28" style:family="paragraph" style:parent-style-name="Table_20_Heading">
      <style:paragraph-properties fo:margin-left="0cm" fo:margin-right="0cm" fo:line-height="150%" fo:text-align="start" style:justify-single-word="false" fo:text-indent="0cm" style:auto-text-indent="false"/>
      <style:text-properties style:font-name="Marianne" fo:font-size="10pt" fo:font-weight="bold" officeooo:paragraph-rsid="004649f4" style:font-size-asian="10pt" style:font-size-complex="10pt"/>
    </style:style>
    <style:style style:name="P29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Marianne" fo:font-size="10pt" officeooo:rsid="003bbf53" officeooo:paragraph-rsid="004649f4" style:font-size-asian="10pt" style:font-size-complex="10pt"/>
    </style:style>
    <style:style style:name="P30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Marianne" fo:font-size="10pt" officeooo:paragraph-rsid="004649f4" style:font-size-asian="10pt" style:font-size-complex="10pt"/>
    </style:style>
    <style:style style:name="P31" style:family="paragraph" style:parent-style-name="Table_20_Contents">
      <style:paragraph-properties fo:line-height="150%" fo:text-align="start" style:justify-single-word="false"/>
      <style:text-properties style:font-name="Marianne" fo:font-size="10pt" officeooo:paragraph-rsid="004649f4" style:font-size-asian="10pt" style:font-size-complex="10pt"/>
    </style:style>
    <style:style style:name="P32" style:family="paragraph" style:parent-style-name="Preformatted_20_Text">
      <style:paragraph-properties fo:text-align="start" style:justify-single-word="false"/>
      <style:text-properties style:font-name="Marianne" fo:font-size="10pt" officeooo:rsid="00373090" officeooo:paragraph-rsid="00453e7a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Marianne" fo:font-size="10pt" officeooo:paragraph-rsid="00453e7a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Marianne" fo:font-size="10pt" style:text-underline-style="none" officeooo:rsid="000ff22d" officeooo:paragraph-rsid="00453e7a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fo:font-weight="bold" officeooo:rsid="00408bfb" officeooo:paragraph-rsid="00408bfb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Marianne" fo:font-size="10pt" officeooo:paragraph-rsid="000ff22d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Marianne" fo:font-size="10pt" officeooo:paragraph-rsid="001f3e54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Marianne" fo:font-size="10pt" style:text-underline-style="solid" style:text-underline-width="auto" style:text-underline-color="font-color" fo:font-weight="bold" officeooo:rsid="0040de24" officeooo:paragraph-rsid="0040de24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Marianne" fo:font-size="10pt" officeooo:rsid="0040de24" officeooo:paragraph-rsid="0040de24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Marianne" fo:font-size="10pt" fo:font-weight="bold" officeooo:rsid="0040de24" officeooo:paragraph-rsid="0040de24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Marianne" fo:font-size="10pt" officeooo:rsid="00126e42" officeooo:paragraph-rsid="001f3e54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Marianne" fo:font-size="10pt" officeooo:rsid="00373090" officeooo:paragraph-rsid="00126e42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Marianne" fo:font-size="10pt" fo:font-style="italic" officeooo:rsid="001fac6d" officeooo:paragraph-rsid="001fac6d" style:font-size-asian="10pt" style:font-style-asian="italic" style:font-size-complex="10pt" style:font-style-complex="italic"/>
    </style:style>
    <style:style style:name="P44" style:family="paragraph" style:parent-style-name="Standard">
      <style:paragraph-properties fo:text-align="justify" style:justify-single-word="false"/>
      <style:text-properties style:font-name="Marianne" fo:font-size="10pt" officeooo:rsid="000ff22d" officeooo:paragraph-rsid="0011061f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Marianne" fo:font-size="10pt" officeooo:rsid="001fac6d" officeooo:paragraph-rsid="001fac6d" style:font-size-asian="10pt" style:font-size-complex="10pt"/>
    </style:style>
    <style:style style:name="T1" style:family="text">
      <style:text-properties fo:background-color="#b3cac7" loext:char-shading-value="0"/>
    </style:style>
    <style:style style:name="T2" style:family="text">
      <style:text-properties style:font-name="Marianne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Mariann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style:font-name="Marianne" fo:font-size="10pt" fo:font-style="italic" fo:font-weight="bold" officeooo:rsid="002208fe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style:font-name="Marianne" fo:font-size="10pt" fo:font-weight="bold" officeooo:rsid="0042a559" fo:background-color="#ff860d" loext:char-shading-value="0" style:font-size-asian="10pt" style:font-weight-asian="bold" style:font-size-complex="10pt" style:font-weight-complex="bold"/>
    </style:style>
    <style:style style:name="T6" style:family="text">
      <style:text-properties style:font-name="Marianne" fo:font-size="10pt" fo:font-weight="bold" officeooo:rsid="0042a559" style:font-size-asian="10pt" style:font-weight-asian="bold" style:font-size-complex="10pt" style:font-weight-complex="bold"/>
    </style:style>
    <style:style style:name="T7" style:family="text">
      <style:text-properties style:font-name="Marianne" fo:font-size="10pt" fo:font-weight="bold" officeooo:rsid="0012174b" style:font-size-asian="10pt" style:font-weight-asian="bold" style:font-size-complex="10pt" style:font-weight-complex="bold"/>
    </style:style>
    <style:style style:name="T8" style:family="text">
      <style:text-properties style:font-name="Marianne" fo:font-size="10pt" fo:font-weight="bold" officeooo:rsid="003bf995" style:font-size-asian="10pt" style:font-weight-asian="bold" style:font-size-complex="10pt" style:font-weight-complex="bold"/>
    </style:style>
    <style:style style:name="T9" style:family="text">
      <style:text-properties style:font-name="Marianne" fo:font-size="10pt" style:font-size-asian="10pt" style:font-size-complex="10pt"/>
    </style:style>
    <style:style style:name="T10" style:family="text">
      <style:text-properties style:font-name="Marianne" fo:font-size="10pt" fo:font-style="italic" officeooo:rsid="002208fe" style:font-size-asian="10pt" style:font-style-asian="italic" style:font-size-complex="10pt" style:font-style-complex="italic"/>
    </style:style>
    <style:style style:name="T11" style:family="text">
      <style:text-properties style:font-name="Marianne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font-name="Marianne" fo:font-size="10pt" officeooo:rsid="0012174b" style:font-size-asian="10pt" style:font-size-complex="10pt"/>
    </style:style>
    <style:style style:name="T13" style:family="text">
      <style:text-properties style:font-name="Marianne" fo:font-size="10pt" officeooo:rsid="0024ecb1" style:font-size-asian="10pt" style:font-size-complex="10pt"/>
    </style:style>
    <style:style style:name="T14" style:family="text">
      <style:text-properties style:font-name="Marianne" style:text-underline-style="none"/>
    </style:style>
    <style:style style:name="T15" style:family="text">
      <style:text-properties style:text-underline-style="non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underline-style="none" officeooo:rsid="000ff22d"/>
    </style:style>
    <style:style style:name="T18" style:family="text">
      <style:text-properties style:font-name="Marianne" fo:font-size="10pt" fo:font-weight="bold" officeooo:rsid="0037b755" style:font-size-asian="10pt" style:font-weight-asian="bold" style:font-size-complex="10pt" style:font-weight-complex="bold"/>
    </style:style>
    <style:style style:name="T19" style:family="text">
      <style:text-properties style:font-name="Marianne" style:text-underline-style="none" officeooo:rsid="000ff22d"/>
    </style:style>
    <style:style style:name="T20" style:family="text">
      <style:text-properties style:font-name="Marianne" style:text-underline-style="none" fo:font-weight="normal" fo:background-color="transparent" loext:char-shading-value="0" style:font-weight-asian="normal" style:font-weight-complex="normal"/>
    </style:style>
    <style:style style:name="T21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font-name="Marianne" fo:background-color="transparent" loext:char-shading-value="0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453e7a"/>
    </style:style>
    <style:style style:name="T26" style:family="text">
      <style:text-properties style:font-name="Marianne"/>
    </style:style>
    <style:style style:name="T27" style:family="text">
      <style:text-properties style:font-name="Marianne" officeooo:rsid="001f3e54"/>
    </style:style>
    <style:style style:name="T28" style:family="text">
      <style:text-properties officeooo:rsid="00379afd"/>
    </style:style>
    <style:style style:name="T29" style:family="text">
      <style:text-properties fo:font-weight="bold" officeooo:rsid="00379afd" style:font-weight-asian="bold" style:font-weight-complex="bold"/>
    </style:style>
    <style:style style:name="T30" style:family="text">
      <style:text-properties fo:font-variant="normal" fo:text-transform="none" fo:color="#161616" loext:opacity="100%" style:font-name="Marianne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31" style:family="text">
      <style:text-properties officeooo:rsid="003bbf53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officeooo:rsid="001f3e54"/>
    </style:style>
    <style:style style:name="T34" style:family="text">
      <style:text-properties officeooo:rsid="003e39ea"/>
    </style:style>
    <style:style style:name="T35" style:family="text">
      <style:text-properties fo:font-weight="bold" officeooo:rsid="001f3e54" style:font-weight-asian="bold" style:font-weight-complex="bold"/>
    </style:style>
    <style:style style:name="T36" style:family="text">
      <style:text-properties fo:font-weight="bold" officeooo:rsid="002ee98c" style:font-weight-asian="bold" style:font-weight-complex="bold"/>
    </style:style>
    <style:style style:name="T37" style:family="text">
      <style:text-properties fo:font-weight="bold" officeooo:rsid="0031727e" style:font-weight-asian="bold" style:font-weight-complex="bold"/>
    </style:style>
    <style:style style:name="T38" style:family="text">
      <style:text-properties officeooo:rsid="002ee98c"/>
    </style:style>
    <style:style style:name="T39" style:family="text">
      <style:text-properties fo:font-weight="bold" officeooo:rsid="0030f9f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urrier de saisine CSRPN/CNPN</text:span></text:p>
      <text:p text:style-name="P2"/>
      <text:p text:style-name="P2"/>
      <text:p text:style-name="P3"><text:span text:style-name="T2">Objet : Saisine </text:span><text:span text:style-name="T3">CNPN/</text:span><text:span text:style-name="T4">CSRPN</text:span><text:span text:style-name="T2"> - demande de dérogation – </text:span><text:span text:style-name="T5">Cas 1, Cas 2 – expert délégué</text:span><text:span text:style-name="T6"> - </text:span><text:span text:style-name="Source_20_Text"><text:span text:style-name="T2">{nom}</text:span></text:span><text:span text:style-name="T2"> </text:span></text:p>
      <text:p text:style-name="P2">PJ : Demande de dérogation espèces protégées et pièces justificatives</text:p>
      <text:p text:style-name="P3"><text:span text:style-name="T7">Numéro du </text:span><text:span text:style-name="T2">Dossier </text:span><text:span text:style-name="T7">(</text:span><text:span text:style-name="T2">ONAGRE</text:span><text:span text:style-name="T7">)</text:span><text:span text:style-name="T2"> : demande N°</text:span><text:span text:style-name="Source_20_Text"><text:span text:style-name="T2">{identifiant_onagre}</text:span></text:span></text:p>
      <text:p text:style-name="P4"><text:span text:style-name="Source_20_Text"><text:span text:style-name="T8">Numéro d’identification unique du projet : </text:span></text:span></text:p>
      <text:p text:style-name="P5"/>
      <text:p text:style-name="P5"/>
      <text:p text:style-name="P6"><text:span text:style-name="T9">Vous trouverez ci-joint pour recueil d’avis du </text:span><text:span text:style-name="T10">CNPN/</text:span><text:span text:style-name="T11">CSRPN Nouvelle-Aquitaine</text:span><text:span text:style-name="T9">, la </text:span><text:span text:style-name="T12">demande de dérogation à caractère scientifique</text:span><text:span text:style-name="T9"> à formulée par </text:span><text:span text:style-name="Source_20_Text"><text:span text:style-name="T9">{demandeur}</text:span></text:span><text:span text:style-name="T9"> , </text:span><text:span text:style-name="T13">{qualification}</text:span><text:span text:style-name="T9">, pour </text:span><text:span text:style-name="Source_20_Text"><text:span text:style-name="T9">{nom}.</text:span></text:span></text:p>
      <text:p text:style-name="P5"/>
      <text:p text:style-name="P7">Présentation du pétitionaire :</text:p>
      <text:p text:style-name="P7"><text:span text:style-name="Source_20_Text"><text:span text:style-name="T14">{demandeur}</text:span></text:span><text:span text:style-name="T15"> </text:span></text:p>
      <text:p text:style-name="P8"/>
      <text:p text:style-name="P8">Présentation du projet :</text:p>
      <text:p text:style-name="P9">{description}</text:p>
      <text:p text:style-name="P10"/>
      <text:p text:style-name="P11"/>
      <text:p text:style-name="P12"><text:span text:style-name="T16">Activité principale : </text:span><text:span text:style-name="T17">{activité_principale} </text:span></text:p>
      <text:p text:style-name="P13"/>
      <text:p text:style-name="P14"><text:span text:style-name="Source_20_Text"><text:span text:style-name="T9">Il s’agit d’un projet en Autorisation environnementale : <text:s/>{#if régime_autorisation_environnementale} </text:span></text:span><text:span text:style-name="Source_20_Text"><text:span text:style-name="T18">Oui</text:span></text:span><text:span text:style-name="Source_20_Text"><text:span text:style-name="T9"> {:else} </text:span></text:span><text:span text:style-name="Source_20_Text"><text:span text:style-name="T18">Non</text:span></text:span><text:span text:style-name="Source_20_Text"><text:span text:style-name="T9"> {/if}</text:span></text:span></text:p>
      <text:p text:style-name="P15"><text:span text:style-name="Source_20_Text"><text:span text:style-name="T19"/></text:span></text:p>
      <text:p text:style-name="P13"/>
      <text:p text:style-name="P16">Synthèse des éléments démontrant qu'il n'existe aucune alternative au projet : </text:p>
      <text:p text:style-name="P17"><text:span text:style-name="Source_20_Text"><text:span text:style-name="T20">{justification_absence_autre_solution_satisfaisante}</text:span></text:span><text:span text:style-name="T21"> </text:span></text:p>
      <text:p text:style-name="P17"/>
      <text:p text:style-name="P18"><text:span text:style-name="T22">Motif de la dérogation :</text:span> </text:p>
      <text:p text:style-name="P19"><text:span text:style-name="Source_20_Text"><text:span text:style-name="T23">{motif_dérogation}</text:span></text:span><text:span text:style-name="T24"> </text:span></text:p>
      <text:p text:style-name="P20"/>
      <text:p text:style-name="P20">Justification du m<text:span text:style-name="T25">oti</text:span>f de la dérogation :</text:p>
      <text:p text:style-name="P21"><text:span text:style-name="Source_20_Text"><text:span text:style-name="T26">{justification_motif_dérogation}</text:span></text:span></text:p>
      <text:p text:style-name="P22"/>
      <text:p text:style-name="P23">Objet de la demande et espèces concernées :</text:p>
      <text:p text:style-name="P24"/>
      <text:p text:style-name="P25"><text:span text:style-name="Source_20_Text"><text:span text:style-name="T27">L</text:span></text:span><text:span text:style-name="Source_20_Text"><text:span text:style-name="T26">es espèces visées par la présente dérogation sont les suivantes :</text:span></text:span></text:p>
      <text:p text:style-name="P26">{#each liste_espèces_par_impact as é<text:span text:style-name="T28">lément</text:span>}</text:p>
      <text:p text:style-name="P26"/>
      <text:p text:style-name="P26"><text:span text:style-name="T16">{é</text:span><text:span text:style-name="T29">lément</text:span><text:span text:style-name="T16">.</text:span><text:span text:style-name="T29">impact</text:span><text:span text:style-name="T16">}</text:span></text:p>
      <text:p text:style-name="P27"><text:span text:style-name="Source_20_Text"><text:span text:style-name="T30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8">Espèce</text:p>
            </table:table-cell>
            <table:table-cell table:style-name="Table1.A1" office:value-type="string">
              <text:p text:style-name="P28">{#each é<text:span text:style-name="T31">lément.liste_noms_impacts_quantifiés</text:span> as nomColonne}</text:p>
            </table:table-cell>
            <table:table-cell table:style-name="Table1.A1" office:value-type="string">
              <text:p text:style-name="P28">{nomColonne}</text:p>
            </table:table-cell>
            <table:table-cell table:style-name="Table1.A1" office:value-type="string">
              <text:p text:style-name="P28">{/each}</text:p>
            </table:table-cell>
          </table:table-row>
        </table:table-header-rows>
        <table:table-row>
          <table:table-cell table:style-name="Table1.A1" office:value-type="string">
            <text:p text:style-name="P26">{#each élément.liste_espèces as espèce}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30"/>
          </table:table-cell>
        </table:table-row>
        <table:table-row table:style-name="Table1.3">
          <table:table-cell table:style-name="Table1.A1" office:value-type="string">
            <text:p text:style-name="P30">{espèce.nomVernaculaire} (<text:span text:style-name="T32">{espèce.nomScientifique}</text:span>)</text:p>
          </table:table-cell>
          <table:table-cell table:style-name="Table1.A1" office:value-type="string">
            <text:p text:style-name="P29">{#each espèce.liste_impacts_quantifiés as impact_quantifié}</text:p>
          </table:table-cell>
          <table:table-cell table:style-name="Table1.A1" office:value-type="string">
            <text:p text:style-name="P29">{impact_quantifié}</text:p>
          </table:table-cell>
          <table:table-cell table:style-name="Table1.A1" office:value-type="string">
            <text:p text:style-name="P29">{/each}</text:p>
          </table:table-cell>
        </table:table-row>
        <table:table-row>
          <table:table-cell table:style-name="Table1.A1" office:value-type="string">
            <text:p text:style-name="P30">{/each}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1"/>
          </table:table-cell>
        </table:table-row>
      </table:table>
      <text:p text:style-name="P27"><text:span text:style-name="Source_20_Text"><text:span text:style-name="T9">{/each}</text:span></text:span></text:p>
      <text:p text:style-name="P32"><text:soft-page-break/><text:span text:style-name="Source_20_Text"><text:span text:style-name="T9"/></text:span></text:p>
      <text:p text:style-name="P33"><text:span text:style-name="T33">L</text:span><text:span text:style-name="T34">es travaux ou interventions vont se dérouler</text:span><text:span text:style-name="T33"> </text:span><text:span text:style-name="T35">du </text:span><text:span text:style-name="T36">{formatter_date_simple</text:span><text:span text:style-name="T37">(</text:span><text:span text:style-name="T36">date_début_intervention</text:span><text:span text:style-name="T37">)</text:span><text:span text:style-name="T36">}</text:span><text:span text:style-name="T35"> au </text:span><text:span text:style-name="T36">{formatter_date_simple</text:span><text:span text:style-name="T37">(</text:span><text:span text:style-name="T36">date_fin_intervention</text:span><text:span text:style-name="T37">)</text:span><text:span text:style-name="T36">}</text:span><text:span text:style-name="T38">.</text:span></text:p>
      <text:p text:style-name="P34"><text:span text:style-name="T33">La dérogation est demandée pour une durée de</text:span><text:span text:style-name="T35"> </text:span><text:span text:style-name="T36">{afficher_nombre</text:span><text:span text:style-name="T39">(</text:span><text:span text:style-name="T36">durée_intervention</text:span><text:span text:style-name="T39">)</text:span><text:span text:style-name="T36">} ans</text:span><text:span text:style-name="T33">.</text:span></text:p>
      <text:p text:style-name="P13"/>
      <text:p text:style-name="P13"/>
      <text:p text:style-name="P35">Nombre de nids d’Hirondelles détruits : </text:p>
      <text:p text:style-name="P36"/>
      <text:p text:style-name="P37"/>
      <text:p text:style-name="P38">Mesures d’évitement :</text:p>
      <text:p text:style-name="P39"/>
      <text:p text:style-name="P39"/>
      <text:p text:style-name="P38">Mesures de réduction :</text:p>
      <text:p text:style-name="P38"/>
      <text:p text:style-name="P40"/>
      <text:p text:style-name="P38">Mesures d’accompagnement :</text:p>
      <text:p text:style-name="P41"/>
      <text:p text:style-name="P42"/>
      <text:p text:style-name="P42"/>
      <text:p text:style-name="P43">CSRPN :</text:p>
      <text:p text:style-name="P44">J’attire votre attention sur le fait qu’au-delà d’un délai de 2 mois à compter de la date de réception du présent courrier, l’avis du CSRPN sera considéré comme favorable tacite </text:p>
      <text:p text:style-name="P10"/>
      <text:p text:style-name="P10"/>
      <text:p text:style-name="P43">OU </text:p>
      <text:p text:style-name="P45"/>
      <text:p text:style-name="P43">CNPN :</text:p>
      <text:p text:style-name="P5">La présente demande de dérogation concernant une espèce appartenant à la liste fixée par l’arrêté ministériel du 9 juillet 1999, un avis du CNPN est requis avant la prise de décision préfectorale.</text:p>
      <text:p text:style-name="P5">Je vous demande de bien vouloir transmettre l’ensemble de ces éléments au CNPN, pour exam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anessa Rispal</meta:initial-creator>
    <meta:creation-date>2025-04-23T11:07:03.927000000</meta:creation-date>
    <dc:date>2026-07-01T15:06:25.460714180</dc:date>
    <meta:editing-duration>PT7H34M53S</meta:editing-duration>
    <meta:editing-cycles>64</meta:editing-cycles>
    <meta:generator>LibreOffice/25.2.0.3$Linux_X86_64 LibreOffice_project/e1cf4a87eb02d755bce1a01209907ea5ddc8f069</meta:generator>
    <meta:document-statistic meta:table-count="1" meta:image-count="0" meta:object-count="0" meta:page-count="2" meta:paragraph-count="45" meta:word-count="285" meta:character-count="2237" meta:non-whitespace-character-count="1983"/>
  </office:meta>
</office:document-meta>
</file>