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afd095"/>
      <style:text-properties style:font-name="Liberation Serif" fo:language="none" fo:country="none" style:font-name-asian="Liberation Serif" style:language-asian="none" style:country-asian="none" style:font-name-complex="Liberation Serif" style:language-complex="none" style:country-complex="none"/>
    </style:style>
    <style:style style:name="ce24" style:family="table-cell" style:parent-style-name="Default">
      <style:table-cell-properties fo:background-color="#afd095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bf819e"/>
      <style:text-properties style:font-name="Liberation Serif" style:font-name-asian="Tahoma" style:font-name-complex="Tahom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31" style:family="table-cell" style:parent-style-name="Default">
      <style:table-cell-properties fo:background-color="#ffa6a6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ffb66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3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e994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6" style:family="table-cell" style:parent-style-name="Default">
      <style:table-cell-properties fo:background-color="#fff3b1"/>
    </style:style>
    <style:style style:name="T1" style:family="text">
      <style:text-properties style:use-window-font-color="true" style:font-name="AppleSystemUIFont" fo:font-size="13pt" style:font-name-asian="AppleSystemUIFont" style:font-name-complex="AppleSystemUIFont" style:font-size-asian="13pt" style:font-size-complex="13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HelveticaNeue" fo:language="none" fo:country="none" style:language-asian="none" style:country-asian="none" style:language-complex="none" style:country-complex="none" style:font-name-asian="HelveticaNeue" style:font-name-complex="HelveticaNeue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Default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  <table:table-cell office:value-type="string" calcext:value-type="string">
            <text:p>Commentaire Pitchou</text:p>
          </table:table-cell>
        </table:table-row>
        <table:table-row table:style-name="ro1">
          <table:table-cell table:style-name="ce3" office:value-type="string" calcext:value-type="string">
            <text:p>Rana pyrenaica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Aethi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n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ctylorhiza sphagnic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mason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uphorbia flavicoma subsp. 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ymn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Hyo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Inula heleni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Kosteletzkya pentacarp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style-name="ce24" office:value-type="string" calcext:value-type="string">
            <text:p>Leucanthemum corsicum subsp. fenzli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oto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3">
          <table:table-cell office:value-type="string" calcext:value-type="string">
            <text:p>Pinguicula grandiflor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  <table:table-cell office:value-type="string" calcext:value-type="string">
            <text:p>On a modifié le nom scientifique qui était <text:span text:style-name="T1">Pinguicula grandiflora subsp. rosea</text:span></text:p>
          </table:table-cell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  <table:table-cell/>
        </table:table-row>
        <table:table-row table:style-name="ro1">
          <table:table-cell table:style-name="ce28" office:value-type="string" calcext:value-type="string">
            <text:p>Bythinella 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  <table:table-cell/>
        </table:table-row>
        <table:table-row table:style-name="ro1">
          <table:table-cell table:style-name="ce31" office:value-type="string" calcext:value-type="string">
            <text:p>Cerambyx cerdo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31" office:value-type="string" calcext:value-type="string">
            <text:p>Coeno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cu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aradrius alexa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li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Emberiza schoeniclus with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Ge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 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37" office:value-type="string" calcext:value-type="string">
            <text:p>Locustella luscini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ergus serrator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terocles alchata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Asplenium seelosi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Cosentinia v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velat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On a modifié le nom scientifique qui était Isoetes velata subsp. Tenuissima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7" office:value-type="string" calcext:value-type="string">
            <text:p>Cerambyx cerdo</text:p>
          </table:table-cell>
          <table:table-cell table:style-name="Default" table:number-columns-repeated="3"/>
          <table:table-cell office:value-type="string" calcext:value-type="string">
            <text:p><text:span text:style-name="T2">Ajouté par nous en plus de </text:span><text:span text:style-name="T3">Cerambyx cerdo cerd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5:41:20.08103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6-01T15:42:01.926086000</dc:date>
    <meta:editing-duration>PT3H27M34S</meta:editing-duration>
    <meta:editing-cycles>97</meta:editing-cycles>
    <meta:generator>LibreOffice/25.2.4.3$MacOSX_AARCH64 LibreOffice_project/33e196637044ead23f5c3226cde09b47731f7e27</meta:generator>
    <meta:document-statistic meta:table-count="2" meta:cell-count="1561" meta:object-count="0"/>
    <meta:user-defined meta:name=""/>
  </office:meta>
</office:document-meta>
</file>